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0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rgfyaewrhgv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20T10:15:03.708000000</meta:creation-date>
    <dc:date>2026-07-20T10:15:14.772000000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7.5.1.2$Windows_X86_64 LibreOffice_project/fcbaee479e84c6cd81291587d2ee68cba099e129</meta:generator>
  </office:meta>
</office:document-meta>
</file>